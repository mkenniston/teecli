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1">
      <style:paragraph-properties fo:text-align="center" style:justify-single-word="false"/>
      <style:text-properties officeooo:paragraph-rsid="001b8eed"/>
    </style:style>
    <style:style style:name="P3" style:family="paragraph" style:parent-style-name="Heading_20_2">
      <style:paragraph-properties fo:text-align="center" style:justify-single-word="false"/>
      <style:text-properties fo:font-weight="normal" style:font-weight-asian="normal" style:font-weight-complex="normal"/>
    </style:style>
    <style:style style:name="P4" style:family="paragraph" style:parent-style-name="Heading_20_3">
      <style:paragraph-properties fo:text-align="center" style:justify-single-word="false"/>
      <style:text-properties fo:font-style="italic" fo:font-weight="normal" style:font-style-asian="italic" style:font-weight-asian="normal" style:font-style-complex="italic" style:font-weight-complex="normal"/>
    </style:style>
    <style:style style:name="P5" style:family="paragraph" style:parent-style-name="Heading_20_3">
      <style:text-properties officeooo:paragraph-rsid="004393c2"/>
    </style:style>
    <style:style style:name="P6" style:family="paragraph" style:parent-style-name="Heading_20_3">
      <style:text-properties officeooo:paragraph-rsid="00534dcb"/>
    </style:style>
    <style:style style:name="P7" style:family="paragraph" style:parent-style-name="Heading_20_3">
      <style:text-properties officeooo:paragraph-rsid="00558020"/>
    </style:style>
    <style:style style:name="P8" style:family="paragraph" style:parent-style-name="Heading_20_3">
      <style:text-properties officeooo:paragraph-rsid="0069eabb"/>
    </style:style>
    <style:style style:name="P9" style:family="paragraph" style:parent-style-name="Standard">
      <style:text-properties officeooo:rsid="001b8eed" officeooo:paragraph-rsid="001b8eed"/>
    </style:style>
    <style:style style:name="P10" style:family="paragraph" style:parent-style-name="Standard">
      <style:text-properties officeooo:paragraph-rsid="001f6a37"/>
    </style:style>
    <style:style style:name="P11" style:family="paragraph" style:parent-style-name="Standard">
      <style:text-properties officeooo:rsid="0025d98a" officeooo:paragraph-rsid="0025d98a"/>
    </style:style>
    <style:style style:name="P12" style:family="paragraph" style:parent-style-name="Standard">
      <style:text-properties officeooo:rsid="0025d98a" officeooo:paragraph-rsid="0069eabb"/>
    </style:style>
    <style:style style:name="P13" style:family="paragraph" style:parent-style-name="Standard">
      <style:text-properties officeooo:rsid="00269bf8" officeooo:paragraph-rsid="00269bf8"/>
    </style:style>
    <style:style style:name="P14" style:family="paragraph" style:parent-style-name="Standard">
      <style:text-properties officeooo:rsid="00269bf8" officeooo:paragraph-rsid="00534dcb"/>
    </style:style>
    <style:style style:name="P15" style:family="paragraph" style:parent-style-name="Standard">
      <style:text-properties officeooo:rsid="00276dee" officeooo:paragraph-rsid="00276dee"/>
    </style:style>
    <style:style style:name="P16" style:family="paragraph" style:parent-style-name="Standard">
      <style:text-properties officeooo:rsid="0028a735" officeooo:paragraph-rsid="0028a735"/>
    </style:style>
    <style:style style:name="P17" style:family="paragraph" style:parent-style-name="Standard">
      <style:text-properties officeooo:rsid="002a3811" officeooo:paragraph-rsid="002a3811"/>
    </style:style>
    <style:style style:name="P18" style:family="paragraph" style:parent-style-name="Standard" style:list-style-name="L1">
      <style:text-properties officeooo:rsid="002a3811" officeooo:paragraph-rsid="002a3811"/>
    </style:style>
    <style:style style:name="P19" style:family="paragraph" style:parent-style-name="Standard" style:list-style-name="L1">
      <style:text-properties officeooo:paragraph-rsid="002a3811"/>
    </style:style>
    <style:style style:name="P20" style:family="paragraph" style:parent-style-name="Standard" style:list-style-name="L2">
      <style:text-properties officeooo:rsid="004393c2" officeooo:paragraph-rsid="004393c2"/>
    </style:style>
    <style:style style:name="P21" style:family="paragraph" style:parent-style-name="Standard">
      <style:text-properties officeooo:paragraph-rsid="004393c2"/>
    </style:style>
    <style:style style:name="P22" style:family="paragraph" style:parent-style-name="Standard" style:list-style-name="L2">
      <style:text-properties officeooo:paragraph-rsid="004393c2"/>
    </style:style>
    <style:style style:name="P23" style:family="paragraph" style:parent-style-name="Standard" style:list-style-name="L3">
      <style:text-properties officeooo:rsid="0050b68d" officeooo:paragraph-rsid="00534dcb"/>
    </style:style>
    <style:style style:name="P24" style:family="paragraph" style:parent-style-name="Standard">
      <style:text-properties officeooo:rsid="0050b68d" officeooo:paragraph-rsid="00534dcb"/>
    </style:style>
    <style:style style:name="P25" style:family="paragraph" style:parent-style-name="Standard" style:list-style-name="L3">
      <style:text-properties officeooo:rsid="00529201" officeooo:paragraph-rsid="00534dcb"/>
    </style:style>
    <style:style style:name="P26" style:family="paragraph" style:parent-style-name="Standard">
      <style:text-properties officeooo:paragraph-rsid="00534dcb"/>
    </style:style>
    <style:style style:name="P27" style:family="paragraph" style:parent-style-name="Standard">
      <style:text-properties officeooo:rsid="005438cb" officeooo:paragraph-rsid="005438cb"/>
    </style:style>
    <style:style style:name="P28" style:family="paragraph" style:parent-style-name="Standard">
      <style:text-properties officeooo:paragraph-rsid="005438cb"/>
    </style:style>
    <style:style style:name="P29" style:family="paragraph" style:parent-style-name="Standard">
      <style:text-properties officeooo:paragraph-rsid="005df730"/>
    </style:style>
    <style:style style:name="P30" style:family="paragraph" style:parent-style-name="Standard">
      <style:text-properties officeooo:rsid="005f5f03" officeooo:paragraph-rsid="005f5f03"/>
    </style:style>
    <style:style style:name="P31" style:family="paragraph" style:parent-style-name="Standard">
      <style:text-properties officeooo:rsid="005f5f03" officeooo:paragraph-rsid="00603d50"/>
    </style:style>
    <style:style style:name="P32" style:family="paragraph" style:parent-style-name="Standard">
      <style:text-properties officeooo:rsid="00603d50" officeooo:paragraph-rsid="00603d50"/>
    </style:style>
    <style:style style:name="P33" style:family="paragraph" style:parent-style-name="Standard">
      <style:text-properties officeooo:paragraph-rsid="00603d50"/>
    </style:style>
    <style:style style:name="P34" style:family="paragraph" style:parent-style-name="Standard">
      <style:text-properties officeooo:paragraph-rsid="006a2236"/>
    </style:style>
    <style:style style:name="P35" style:family="paragraph" style:parent-style-name="Text_20_body">
      <style:text-properties officeooo:paragraph-rsid="00558020"/>
    </style:style>
    <style:style style:name="P36" style:family="paragraph" style:parent-style-name="Text_20_body">
      <style:text-properties officeooo:paragraph-rsid="00625bd8"/>
    </style:style>
    <style:style style:name="T1" style:family="text">
      <style:text-properties officeooo:rsid="001b8eed"/>
    </style:style>
    <style:style style:name="T2" style:family="text">
      <style:text-properties officeooo:rsid="001ce343"/>
    </style:style>
    <style:style style:name="T3" style:family="text">
      <style:text-properties officeooo:rsid="001d9c55"/>
    </style:style>
    <style:style style:name="T4" style:family="text">
      <style:text-properties officeooo:rsid="001dd312"/>
    </style:style>
    <style:style style:name="T5" style:family="text">
      <style:text-properties officeooo:rsid="001e5ffa"/>
    </style:style>
    <style:style style:name="T6" style:family="text">
      <style:text-properties officeooo:rsid="001f6a37"/>
    </style:style>
    <style:style style:name="T7" style:family="text">
      <style:text-properties officeooo:rsid="00205834"/>
    </style:style>
    <style:style style:name="T8" style:family="text">
      <style:text-properties officeooo:rsid="00215cf8"/>
    </style:style>
    <style:style style:name="T9" style:family="text">
      <style:text-properties officeooo:rsid="0021885b"/>
    </style:style>
    <style:style style:name="T10" style:family="text">
      <style:text-properties officeooo:rsid="00225fde"/>
    </style:style>
    <style:style style:name="T11" style:family="text">
      <style:text-properties officeooo:rsid="0022b44e"/>
    </style:style>
    <style:style style:name="T12" style:family="text">
      <style:text-properties officeooo:rsid="00241305"/>
    </style:style>
    <style:style style:name="T13" style:family="text">
      <style:text-properties officeooo:rsid="002533ae"/>
    </style:style>
    <style:style style:name="T14" style:family="text">
      <style:text-properties officeooo:rsid="0025d98a"/>
    </style:style>
    <style:style style:name="T15" style:family="text">
      <style:text-properties style:font-name="Liberation Sans" fo:font-size="14.1000003814697pt" fo:font-weight="bold" officeooo:rsid="00276dee" style:font-name-asian="Noto Sans CJK SC" style:font-size-asian="14.1000003814697pt" style:font-weight-asian="bold" style:font-name-complex="Lohit Devanagari" style:font-size-complex="14.1000003814697pt" style:font-weight-complex="bold"/>
    </style:style>
    <style:style style:name="T16" style:family="text">
      <style:text-properties style:font-name="Liberation Sans" fo:font-size="14.1000003814697pt" fo:font-weight="bold" officeooo:rsid="00558020" style:font-name-asian="Noto Sans CJK SC" style:font-size-asian="14.1000003814697pt" style:font-weight-asian="bold" style:font-name-complex="Lohit Devanagari" style:font-size-complex="14.1000003814697pt" style:font-weight-complex="bold"/>
    </style:style>
    <style:style style:name="T17" style:family="text">
      <style:text-properties officeooo:rsid="0028a735"/>
    </style:style>
    <style:style style:name="T18" style:family="text">
      <style:text-properties officeooo:rsid="002a3811"/>
    </style:style>
    <style:style style:name="T19" style:family="text">
      <style:text-properties officeooo:rsid="002acfc4"/>
    </style:style>
    <style:style style:name="T20" style:family="text">
      <style:text-properties officeooo:rsid="002c1aca"/>
    </style:style>
    <style:style style:name="T21" style:family="text">
      <style:text-properties officeooo:rsid="002d415f"/>
    </style:style>
    <style:style style:name="T22" style:family="text">
      <style:text-properties officeooo:rsid="002f0e76"/>
    </style:style>
    <style:style style:name="T23" style:family="text">
      <style:text-properties officeooo:rsid="002f6bdf"/>
    </style:style>
    <style:style style:name="T24" style:family="text">
      <style:text-properties officeooo:rsid="0030dba0"/>
    </style:style>
    <style:style style:name="T25" style:family="text">
      <style:text-properties officeooo:rsid="00320ca1"/>
    </style:style>
    <style:style style:name="T26" style:family="text">
      <style:text-properties officeooo:rsid="0034cb36"/>
    </style:style>
    <style:style style:name="T27" style:family="text">
      <style:text-properties fo:font-style="italic" style:font-style-asian="italic" style:font-style-complex="italic"/>
    </style:style>
    <style:style style:name="T28" style:family="text">
      <style:text-properties fo:font-style="italic" officeooo:rsid="0034cb36" style:font-style-asian="italic" style:font-style-complex="italic"/>
    </style:style>
    <style:style style:name="T29" style:family="text">
      <style:text-properties fo:font-style="italic" officeooo:rsid="00398220" style:font-style-asian="italic" style:font-style-complex="italic"/>
    </style:style>
    <style:style style:name="T30" style:family="text">
      <style:text-properties fo:font-style="italic" officeooo:rsid="003b6450" style:font-style-asian="italic" style:font-style-complex="italic"/>
    </style:style>
    <style:style style:name="T31" style:family="text">
      <style:text-properties fo:font-style="italic" officeooo:rsid="006a2236" style:font-style-asian="italic" style:font-style-complex="italic"/>
    </style:style>
    <style:style style:name="T32" style:family="text">
      <style:text-properties officeooo:rsid="0036472d"/>
    </style:style>
    <style:style style:name="T33" style:family="text">
      <style:text-properties officeooo:rsid="0037bfde"/>
    </style:style>
    <style:style style:name="T34" style:family="text">
      <style:text-properties officeooo:rsid="00391bdd"/>
    </style:style>
    <style:style style:name="T35" style:family="text">
      <style:text-properties officeooo:rsid="00398220"/>
    </style:style>
    <style:style style:name="T36" style:family="text">
      <style:text-properties fo:font-style="normal" style:font-style-asian="normal" style:font-style-complex="normal"/>
    </style:style>
    <style:style style:name="T37" style:family="text">
      <style:text-properties fo:font-style="normal" officeooo:rsid="00398220" style:font-style-asian="normal" style:font-style-complex="normal"/>
    </style:style>
    <style:style style:name="T38" style:family="text">
      <style:text-properties fo:font-style="normal" officeooo:rsid="0034cb36" style:font-style-asian="normal" style:font-style-complex="normal"/>
    </style:style>
    <style:style style:name="T39" style:family="text">
      <style:text-properties fo:font-style="normal" officeooo:rsid="006a2236" style:font-style-asian="normal" style:font-style-complex="normal"/>
    </style:style>
    <style:style style:name="T40" style:family="text">
      <style:text-properties officeooo:rsid="003b6450"/>
    </style:style>
    <style:style style:name="T41" style:family="text">
      <style:text-properties officeooo:rsid="003c90fc"/>
    </style:style>
    <style:style style:name="T42" style:family="text">
      <style:text-properties officeooo:rsid="003e1409"/>
    </style:style>
    <style:style style:name="T43" style:family="text">
      <style:text-properties officeooo:rsid="003eaf65"/>
    </style:style>
    <style:style style:name="T44" style:family="text">
      <style:text-properties officeooo:rsid="00407c84"/>
    </style:style>
    <style:style style:name="T45" style:family="text">
      <style:text-properties officeooo:rsid="00420994"/>
    </style:style>
    <style:style style:name="T46" style:family="text">
      <style:text-properties officeooo:rsid="0042b75c"/>
    </style:style>
    <style:style style:name="T47" style:family="text">
      <style:text-properties officeooo:rsid="004393c2"/>
    </style:style>
    <style:style style:name="T48" style:family="text">
      <style:text-properties officeooo:rsid="00457ac6"/>
    </style:style>
    <style:style style:name="T49" style:family="text">
      <style:text-properties officeooo:rsid="00474584"/>
    </style:style>
    <style:style style:name="T50" style:family="text">
      <style:text-properties officeooo:rsid="00476c6d"/>
    </style:style>
    <style:style style:name="T51" style:family="text">
      <style:text-properties officeooo:rsid="00489d2f"/>
    </style:style>
    <style:style style:name="T52" style:family="text">
      <style:text-properties officeooo:rsid="0048d506"/>
    </style:style>
    <style:style style:name="T53" style:family="text">
      <style:text-properties officeooo:rsid="00496e11"/>
    </style:style>
    <style:style style:name="T54" style:family="text">
      <style:text-properties officeooo:rsid="004d2972"/>
    </style:style>
    <style:style style:name="T55" style:family="text">
      <style:text-properties officeooo:rsid="004e2840"/>
    </style:style>
    <style:style style:name="T56" style:family="text">
      <style:text-properties officeooo:rsid="004f3a49"/>
    </style:style>
    <style:style style:name="T57" style:family="text">
      <style:text-properties officeooo:rsid="00506bbd"/>
    </style:style>
    <style:style style:name="T58" style:family="text">
      <style:text-properties officeooo:rsid="005438cb"/>
    </style:style>
    <style:style style:name="T59" style:family="text">
      <style:text-properties officeooo:rsid="00558020"/>
    </style:style>
    <style:style style:name="T60" style:family="text">
      <style:text-properties officeooo:rsid="00570fdc"/>
    </style:style>
    <style:style style:name="T61" style:family="text">
      <style:text-properties officeooo:rsid="0058a7b6"/>
    </style:style>
    <style:style style:name="T62" style:family="text">
      <style:text-properties officeooo:rsid="005a6d74"/>
    </style:style>
    <style:style style:name="T63" style:family="text">
      <style:text-properties officeooo:rsid="005c053d"/>
    </style:style>
    <style:style style:name="T64" style:family="text">
      <style:text-properties officeooo:rsid="005df730"/>
    </style:style>
    <style:style style:name="T65" style:family="text">
      <style:text-properties officeooo:rsid="005f5f03"/>
    </style:style>
    <style:style style:name="T66" style:family="text">
      <style:text-properties officeooo:rsid="00603d50"/>
    </style:style>
    <style:style style:name="T67" style:family="text">
      <style:text-properties officeooo:rsid="0060904d"/>
    </style:style>
    <style:style style:name="T68" style:family="text">
      <style:text-properties officeooo:rsid="006155d8"/>
    </style:style>
    <style:style style:name="T69" style:family="text">
      <style:text-properties officeooo:rsid="00625bd8"/>
    </style:style>
    <style:style style:name="T70" style:family="text">
      <style:text-properties officeooo:rsid="00636143"/>
    </style:style>
    <style:style style:name="T71" style:family="text">
      <style:text-properties officeooo:rsid="0063c427"/>
    </style:style>
    <style:style style:name="T72" style:family="text">
      <style:text-properties officeooo:rsid="00651592"/>
    </style:style>
    <style:style style:name="T73" style:family="text">
      <style:text-properties officeooo:rsid="00657f10"/>
    </style:style>
    <style:style style:name="T74" style:family="text">
      <style:text-properties officeooo:rsid="00660804"/>
    </style:style>
    <style:style style:name="T75" style:family="text">
      <style:text-properties officeooo:rsid="0067e845"/>
    </style:style>
    <style:style style:name="T76" style:family="text">
      <style:text-properties officeooo:rsid="006a223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TEECLI <text:s text:c="78"/></text:span>Test Execution Environment for <text:s text:c="33"/>Cross-Language Implementations</text:h>
      <text:h text:style-name="P3" text:outline-level="2">Executable specifications for cross-language parity.</text:h>
      <text:h text:style-name="P4" text:outline-level="3">One specification. One test suite. Many implementations.</text:h>
      <text:p text:style-name="Standard"/>
      <text:h text:style-name="Heading_20_3" text:outline-level="3">Executive Summary:</text:h>
      <text:p text:style-name="P10"><text:span text:style-name="T1">TEECLI (pronounced </text:span><text:span text:style-name="T18">TEAK</text:span><text:span text:style-name="T1">-lee) </text:span><text:span text:style-name="T6">is a </text:span>framework for using a single suite of executable specifications to verify the behavioral parity of multiple implementations of a library in different languages. <text:s/><text:span text:style-name="T11">Any</text:span><text:span text:style-name="T1"> natural language description of the </text:span><text:span text:style-name="T6">desired</text:span><text:span text:style-name="T1"> behavior </text:span><text:span text:style-name="T10">is considered to be</text:span><text:span text:style-name="T6"> only</text:span><text:span text:style-name="T1"> a</text:span><text:span text:style-name="T7">n aid and</text:span><text:span text:style-name="T1"> explanation, </text:span><text:span text:style-name="T6">and</text:span><text:span text:style-name="T1"> </text:span><text:span text:style-name="T10">we </text:span><text:span text:style-name="T1">assume that the automated test suite is the formal specification. <text:s/></text:span><text:span text:style-name="T12">By u</text:span><text:span text:style-name="T8">sing small VMs to make</text:span><text:span text:style-name="T6"> this specification executable </text:span><text:span text:style-name="T7">across multiple languages</text:span><text:span text:style-name="T6">, rigorous conformance testing of every implementation is possible using only a single </text:span><text:span text:style-name="T13">common </text:span><text:span text:style-name="T6">test suite, </text:span><text:span text:style-name="T8">and there is no </text:span><text:span text:style-name="T9">room for </text:span><text:span text:style-name="T8">differing interpretations of the specification. <text:s/></text:span><text:span text:style-name="T1">The architecture is modular so that additional languages may be added, and </text:span><text:span text:style-name="T2">the </text:span><text:span text:style-name="T8">library</text:span><text:span text:style-name="T2"> need not be modified to be tested. <text:s/></text:span><text:span text:style-name="T3">TEECLI is open-sourced under the LGPL, </text:span><text:span text:style-name="T4">is </text:span><text:span text:style-name="T5">available</text:span><text:span text:style-name="T4"> on GitHub,</text:span><text:span text:style-name="T3"> and runs under </text:span><text:span text:style-name="T4">Linux.</text:span></text:p>
      <text:h text:style-name="P1" text:outline-level="1">Overview</text:h>
      <text:h text:style-name="P7" text:outline-level="3">Who needs TEECLI?</text:h>
      <text:p text:style-name="P35"/>
      <text:p text:style-name="P36"><text:span text:style-name="T69">TEECLI is a niche tool. <text:s/>It is designed to handle a specific uncommon situation, and to handle it well. <text:s/>This first section describes the situation where TEECLI is an appropriate tool to use.</text:span></text:p>
      <text:p text:style-name="P28"><text:span text:style-name="T58">Assume you have a piece of software, typically a library, which performs some valuable function. <text:s/>It was first written in some programming language X, and it is so useful that X programmers everywhere all love it. <text:s/>Unfortunately the Y language programmers are now upset with you because they want to use your library but cannot easily integrate it into their Y projects.</text:span></text:p>
      <text:p text:style-name="P27"/>
      <text:p text:style-name="P27">The obvious solution is to re-write the library in Y. <text:s/>You can do that, <text:span text:style-name="T59">and it works, </text:span>but in addition to re-writing all the code in Y you also have to re-write all the tests in Y. <text:s/>And before you know it the Z programmers come along and you have to do it all again a third time.</text:p>
      <text:p text:style-name="P27"/>
      <text:p text:style-name="P28"><text:span text:style-name="T58">That might work </text:span><text:span text:style-name="T59">(actually probably not, but we’ll be optimists for a moment)</text:span><text:span text:style-name="T58">, except that even though your programmers are so </text:span><text:span text:style-name="T59">skilled that no bugs ever</text:span><text:span text:style-name="T58"> slip into production, you keep getting change requests for enhancements so the codebase is in constant flux. <text:s/>Every time the code changes, some tests change too, and it has to happen in </text:span><text:span text:style-name="T60">all three languages </text:span><text:span text:style-name="T58">X, Y, and Z. <text:s/></text:span><text:span text:style-name="T61">You need to guarantee to your users that all three versions (languages) work the same and produce identical results, so ho</text:span><text:span text:style-name="T58">w do you keep </text:span><text:span text:style-name="T61">everything</text:span><text:span text:style-name="T58"> in sync?</text:span></text:p>
      <text:p text:style-name="P27"/>
      <text:p text:style-name="P28"><text:soft-page-break/><text:span text:style-name="T58">Well, you’ll automate it course, but the trick is to never have multiple versions of any tests. <text:s/>You maintain one single common test suite, which is defined to be the formal specification of your library’s behavior. <text:s/>Then you can run that “executable specification” against all three versions of your library, and it will tell you </text:span><text:span text:style-name="T62">what’s broken so you can fix it</text:span><text:span text:style-name="T58">.</text:span></text:p>
      <text:p text:style-name="P28"><text:line-break/><text:span text:style-name="T58">The hard part is writing a single specification that can be executed in multiple languages. <text:s/>That’s </text:span><text:span text:style-name="T59">why you need TEECLI: <text:s/>it gives you </text:span><text:span text:style-name="T58">a language </text:span><text:span text:style-name="T63">for executable specifications</text:span><text:span text:style-name="T58">, and a set of small VMs that can execute that specification in all your target languages.</text:span></text:p>
      <text:p text:style-name="P9"/>
      <text:h text:style-name="P7" text:outline-level="3"><text:span text:style-name="T16">How does</text:span> TEECLI <text:span text:style-name="T16">work</text:span>?</text:h>
      <text:p text:style-name="P29"><text:span text:style-name="T65">Step 1: <text:s/>Y</text:span><text:span text:style-name="T64">ou write an executable specification. <text:s/>TEECLI uses a language we call EBS (Executable Behavioral Specification) which is a small subset of the existing language “racket”. <text:s/>Racket is well-established, stable, has nice tooling, and is very thoroughly documented. <text:s/></text:span><text:span text:style-name="T65">It is also a “real” programming language, with loops and conditionals and functions and strings and arithmetic and everything, so it’s powerful enough for you to write whatever tests you need.</text:span></text:p>
      <text:p text:style-name="P29"/>
      <text:p text:style-name="P30">Step 2: <text:s/>You run the “compiler”, which parses your EBS code and converts it into an intermediate form <text:span text:style-name="T70">that will be needed later.</text:span></text:p>
      <text:p text:style-name="P30"/>
      <text:p text:style-name="P33"><text:span text:style-name="T65">Step 3: <text:s/>Now you choose which language </text:span><text:span text:style-name="T70">will be tested</text:span><text:span text:style-name="T65"> </text:span><text:span text:style-name="T70">first</text:span><text:span text:style-name="T65">. <text:s/></text:span><text:span text:style-name="T71">For the purposes of this example, w</text:span><text:span text:style-name="T65">e’ll assume you want to start with python (you can do the others later). <text:s/>You write a little bit of python code to provide a “foreign function interface” (FFI). <text:s/>Don’t worry, it’s boilerplate code and there are examples you can follow.</text:span></text:p>
      <text:p text:style-name="P31"/>
      <text:p text:style-name="P31"><text:span text:style-name="T66">Step 4:</text:span> <text:s/>Th<text:span text:style-name="T66">e</text:span> FFI <text:span text:style-name="T66">you just wrote, </text:span><text:span text:style-name="T72">along with your actual library,</text:span><text:span text:style-name="T66"> </text:span>gets <text:span text:style-name="T66">linked into the “executer”. <text:s/></text:span><text:span text:style-name="T72">This is a </text:span><text:span text:style-name="T66">VM (virtual machine) written in the target language (in this example python) that implements a</text:span><text:span text:style-name="T73">n</text:span><text:span text:style-name="T66"> EBS machine.</text:span></text:p>
      <text:p text:style-name="P31"/>
      <text:p text:style-name="P33"><text:span text:style-name="T66">Step 5: <text:s/>You run the executer. <text:s/>It reads in the intermediate form from step 2, which is just an encoding of your EBS code that you wrote in step 1, so your executable specification is now inside the executer. <text:s/>Next the executer executes </text:span><text:span text:style-name="T74">your specification</text:span><text:span text:style-name="T66">, and it is able to use the FFI to call the python-native code in your library.</text:span></text:p>
      <text:p text:style-name="P30"/>
      <text:p text:style-name="P32">Step 6: <text:s/>The executer prints out the raw results. <text:s/>TEECLI provides tools to massage those results into readable reports.</text:p>
      <text:p text:style-name="P32"/>
      <text:p text:style-name="P33"><text:span text:style-name="T66">Now repeat steps 3-6 for each </text:span><text:span text:style-name="T67">of </text:span><text:span text:style-name="T68">your</text:span><text:span text:style-name="T67"> remaining target</text:span><text:span text:style-name="T66"> language</text:span><text:span text:style-name="T67">s</text:span><text:span text:style-name="T66">.</text:span></text:p>
      <text:p text:style-name="P32"/>
      <text:p text:style-name="P33"><text:span text:style-name="T66">Congratulations, you just ran an executable specification </text:span><text:span text:style-name="T75">in</text:span><text:span text:style-name="T66"> multiple languages.</text:span></text:p>
      <text:h text:style-name="P6" text:outline-level="3">Definitions</text:h>
      <text:p text:style-name="P24">For clarity, we’ll define a few terms here:</text:p>
      <text:list xml:id="list2761463093" text:style-name="L3">
        <text:list-item>
          <text:p text:style-name="P23">Cross-language: <text:s/>we use this term to refer to software which implements identical functionality in multiple languages.</text:p>
        </text:list-item>
        <text:list-item>
          <text:p text:style-name="P25">Specification: <text:s/>In TEECLI, a specification is a piece of executable code that can be run without modification in multiple languages.</text:p>
        </text:list-item>
        <text:list-item>
          <text:p text:style-name="P23">Target language: <text:s/>the language(s) in which the cross-language library is written.</text:p>
        </text:list-item>
      </text:list>
      <text:h text:style-name="P8" text:outline-level="3"><text:soft-page-break/>Design Philosophy</text:h>
      <text:p text:style-name="P12"><text:span text:style-name="T14">Xx</text:span></text:p>
      <text:h text:style-name="P6" text:outline-level="3">Goals:</text:h>
      <text:p text:style-name="P26"><text:span text:style-name="T29">Correctness:</text:span><text:span text:style-name="T35"> <text:s/>The whole point of TEECLI is to provide very high confidence in the correctness of the library being tested, so any incorrect test results would defeat the whole purpose. <text:s/></text:span><text:span text:style-name="T40">This is the one goal that cannot be compromised. <text:s/></text:span><text:span text:style-name="T41">To </text:span><text:span text:style-name="T43">help </text:span><text:span text:style-name="T41">achieve this we use TEECLI to test itself.</text:span></text:p>
      <text:p text:style-name="P26"/>
      <text:p text:style-name="P26"><text:span text:style-name="T30">Simple, consistent coding:</text:span><text:span text:style-name="T40"> <text:s/>The biggest, most important chunks of code in TEECLI are the VMs that implement the EBS virtual machine</text:span><text:span text:style-name="T44">s.</text:span><text:span text:style-name="T40"> <text:s/></text:span><text:span text:style-name="T42">Since each of these is written in a different </text:span><text:span text:style-name="T45">target</text:span><text:span text:style-name="T42"> language, they will of necessity be written and maintained by programmers who often do not have much experience in that language. <text:s/>They will also have to move between languages a lot, which can cause a lot of mental friction. <text:s/>To make life as simple as possible (and the code as reliable as possible), we try to code each VM to look just like </text:span><text:span text:style-name="T46">all</text:span><text:span text:style-name="T42"> the others. <text:s/>We use only basic constructs, no bells-and-whistles, and keep the code for all the VMs looking as much as possible like all the others.</text:span></text:p>
      <text:h text:style-name="P6" text:outline-level="3">Non-Goals:</text:h>
      <text:p text:style-name="P26"><text:span text:style-name="T28">Performance: </text:span><text:span text:style-name="T26"><text:s/></text:span><text:span text:style-name="T25">TEECLI has an uncommon approach to </text:span><text:span text:style-name="T26">performance</text:span><text:span text:style-name="T25">: <text:s/>We don’t care too much about </text:span><text:span text:style-name="T26">it</text:span><text:span text:style-name="T25">. <text:s/>If the test suites run </text:span><text:span text:style-name="T32">more </text:span><text:span text:style-name="T25">slowly </text:span><text:span text:style-name="T32">than we’d like</text:span><text:span text:style-name="T25">, that’s a small price to pay for the benefits of having a single common specification that is valid and automatically verifiable in all target languages. <text:s/></text:span><text:span text:style-name="T33">Remember that the performance of TEECLI has nothing to do with the performance of users’ programs, so any effort put into tuning the testing tool has no value to the final end user. <text:s/>Only if TEECLI gets so slow that it interferes with maintaining the tool will we </text:span><text:span text:style-name="T34">bother looking</text:span><text:span text:style-name="T33"> at this.</text:span></text:p>
      <text:h text:style-name="P6" text:outline-level="3">Anti-Goals:</text:h>
      <text:p text:style-name="P26"><text:span text:style-name="T28">Idiomatic programming: </text:span><text:span text:style-name="T38"><text:s/></text:span><text:span text:style-name="T37">Most programming languages have a certain style and preferred way of doing things, often ways that are unusual or even unique to that language. <text:s/>Programmers take pride in learning and using these techniques, and that usually makes sense because it makes the code easier to read for those with experience in the language. <text:s/>However, TEECLI supports so many target languages that it will very likely be maintained by programmers who are not very familiar with all those languages. <text:s/>For this one project, writing code in every language as if it were Python makes the most sense.</text:span></text:p>
      <text:p text:style-name="P26"><text:span text:style-name="T37"/></text:p>
      <text:p text:style-name="P34"><text:span text:style-name="T29">C</text:span><text:span text:style-name="T31">ompiler hacking:</text:span><text:span text:style-name="T39"> <text:s/>Many languages do define FFI mechanisms, but others may not, and that’s another level of complexity that we don’t need. <text:s/>It seems much more consistent to use our own system that will work the same way in every VM.</text:span></text:p>
      <text:h text:style-name="P6" text:outline-level="3">Architecture</text:h>
      <text:p text:style-name="P14"/>
      <text:p text:style-name="P14">xx</text:p>
      <text:h text:style-name="P5" text:outline-level="3">Roles</text:h>
      <text:p text:style-name="P21">People will interact with TEECLI in different ways, depending on what role they are playing. <text:s/>Let’s look at the main roles that are relevant to us:</text:p>
      <text:list xml:id="list2340517410" text:style-name="L2">
        <text:list-item>
          <text:p text:style-name="P22"><text:span text:style-name="T47">TEECLI developers: <text:s/>These write the framework code, test it, maintain it, and extend it. <text:s/>They need to grasp the whole architecture, and must be at least somewhat comfortable working with multiple target languages. <text:s/>They will usually be the ones to add new VMs, but could also be </text:span><text:soft-page-break/><text:span text:style-name="T47">working on the data-reporting tools. <text:s/></text:span><text:span text:style-name="T50">TEECLI is a meta-tool, because it’s a tool that other tool-makers use.</text:span></text:p>
        </text:list-item>
        <text:list-item>
          <text:p text:style-name="P22"><text:span text:style-name="T47">Library developers: <text:s/>These are writing code to implement some API in multiple languages, typically some piece of functionality that they expect to have wide application. <text:s/>They are building a tool for others to use. <text:s/>For them TEECLI is just a tool that enables good testing, so the less time they have to spend thinking about TEECLI the more time they can focus on the thing they’re actually building. <text:s/>They will have to learn enough EBS to write their </text:span><text:span text:style-name="T51">custom</text:span><text:span text:style-name="T47"> specifications, but </text:span><text:span text:style-name="T48">the framework</text:span><text:span text:style-name="T47"> comes with lots of examples </text:span><text:span text:style-name="T49">they can</text:span><text:span text:style-name="T47"> copy and follow. <text:s/></text:span><text:span text:style-name="T48">These </text:span><text:span text:style-name="T50">are</text:span><text:span text:style-name="T48"> the </text:span><text:span text:style-name="T50">direct</text:span><text:span text:style-name="T48"> “customers” of TEECLI.</text:span></text:p>
        </text:list-item>
        <text:list-item>
          <text:p text:style-name="P20">Application developers: <text:s/><text:span text:style-name="T49">These write programs that make things happen that somebody can actually see. <text:s/>Think of any program that has a GUI. <text:s/>Application developers are using the library as a tool, but they probably don’t think about it much, and </text:span><text:span text:style-name="T52">they </text:span><text:span text:style-name="T49">may not even realize that the library </text:span><text:span text:style-name="T52">they’re using </text:span><text:span text:style-name="T49">supports multiple languages. <text:s/>They will never see or hear about TEECLI, but indirectly they are relying on it.</text:span></text:p>
        </text:list-item>
        <text:list-item>
          <text:p text:style-name="P22"><text:span text:style-name="T47">Final end users: <text:s/></text:span><text:span text:style-name="T49">The folks with a mouse and keyboard, a task, </text:span><text:span text:style-name="T53">a manager, </text:span><text:span text:style-name="T49">and a deadline. <text:s/>They just want the GUI to work and give the right answers. <text:s/>They often don’t even know what language the application they’re using is written in, </text:span><text:span text:style-name="T53">let alone what libraries are involved</text:span><text:span text:style-name="T49">. <text:s/>End users are far removed from cross-language testing, but at the end of the day the value created by TEECLI is directly dependent on the measurable value produced by end users. <text:s/></text:span><text:span text:style-name="T54">It </text:span><text:span text:style-name="T57">looks</text:span><text:span text:style-name="T54"> very abstract, but if you multipl</text:span><text:span text:style-name="T55">y</text:span><text:span text:style-name="T54"> the number of libraries using TEECLI times the number of applications using each </text:span><text:span text:style-name="T56">of those libraries</text:span><text:span text:style-name="T54"> times the number of users running each </text:span><text:span text:style-name="T56">of hose </text:span><text:span text:style-name="T54">application</text:span><text:span text:style-name="T56">s,</text:span><text:span text:style-name="T54"> the number could be pretty respectable.</text:span></text:p>
        </text:list-item>
      </text:list>
      <text:h text:style-name="Heading_20_3" text:outline-level="3">Languages</text:h>
      <text:p text:style-name="P11"/>
      <text:p text:style-name="P17">There are a number of languages used within TEECLI. <text:s/>All are open-sourced or otherwise freely available.</text:p>
      <text:p text:style-name="P17"/>
      <text:list xml:id="list14623682" text:style-name="L1">
        <text:list-item>
          <text:p text:style-name="P18">Bash – This is the glue that holds all the other pieces together. <text:s/>Primary used to control the flow of data and the invocation of various executable programs.</text:p>
        </text:list-item>
        <text:list-item>
          <text:p text:style-name="P18">Racket – A descendant of Scheme, which is in turn a descendant of LISP. <text:s/>We leverage both the design and tools of Racket to minimize the code we need to write.</text:p>
        </text:list-item>
        <text:list-item>
          <text:p text:style-name="P19"><text:span text:style-name="T18">Ebs – Executable Behavioral Specification. <text:s/>This is a small subset of racket, chosen to be just barely sufficient to write nice executable specifications (i.e. tests). <text:s/>Every ebs program is </text:span><text:span text:style-name="T22">also </text:span><text:span text:style-name="T18">a </text:span><text:span text:style-name="T21">valid</text:span><text:span text:style-name="T18"> racket program.</text:span></text:p>
        </text:list-item>
        <text:list-item>
          <text:p text:style-name="P18">Ese – Encoded S-Expression<text:span text:style-name="T20">s</text:span>. <text:s/>This is a tiny byte-coded language, so simpl<text:span text:style-name="T19">e that</text:span> it looks like no more than a simple data format. <text:s/>Technically it consists of byte-code <text:span text:style-name="T23">instructions </text:span>for a machine which builds S-expressions, and it is only used in the <text:span text:style-name="T24">data </text:span>pipeline from the compiler to the executer so you probably will never see it.</text:p>
        </text:list-item>
        <text:list-item>
          <text:p text:style-name="P18">Targets – E.g. <text:span text:style-name="T14">python, javascript, c. <text:s/></text:span>All the languages that your library supports are considered target languages. <text:s/>A set of them comes “in the box” when you download TEECLI, but more can be added if the need arises.</text:p>
        </text:list-item>
      </text:list>
      <text:h text:style-name="Heading_20_3" text:outline-level="3">Adding a target language</text:h>
      <text:p text:style-name="P13"/>
      <text:p text:style-name="P13">xx</text:p>
      <text:p text:style-name="P13"/>
      <text:h text:style-name="Heading_20_3" text:outline-level="3"><text:soft-page-break/>Adding an application</text:h>
      <text:p text:style-name="P13"/>
      <text:p text:style-name="P13">xx</text:p>
      <text:p text:style-name="P13"/>
      <text:h text:style-name="Heading_20_3" text:outline-level="3">Example: <text:s/>TrivialExample</text:h>
      <text:p text:style-name="P13"/>
      <text:p text:style-name="P13">xx</text:p>
      <text:p text:style-name="P13"/>
      <text:h text:style-name="Heading_20_3" text:outline-level="3">Example: <text:s/>PhysQuan</text:h>
      <text:p text:style-name="P13"/>
      <text:p text:style-name="P13">xx</text:p>
      <text:p text:style-name="P13"/>
      <text:h text:style-name="Heading_20_3" text:outline-level="3">Example: <text:s/>Coloration</text:h>
      <text:p text:style-name="P13"/>
      <text:p text:style-name="P13">xx</text:p>
      <text:p text:style-name="P13"/>
      <text:h text:style-name="Heading_20_3" text:outline-level="3">How To Install and <text:span text:style-name="T15">Run</text:span> TEECLI</text:h>
      <text:p text:style-name="P13"/>
      <text:p text:style-name="P15">tools/verification-check.bash</text:p>
      <text:p text:style-name="P15">./<text:span text:style-name="T17">run_all.bash</text:span></text:p>
      <text:p text:style-name="P15"/>
      <text:h text:style-name="P6" text:outline-level="3">Design Decisions (Appendix)</text:h>
      <text:p text:style-name="P14"/>
      <text:p text:style-name="P14">xxx</text:p>
      <text:p text:style-name="P11"/>
      <text:p text:style-name="P16">== END ==</text:p>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6-07-19T14:29:59.394395066</meta:creation-date>
    <dc:date>2026-07-19T18:02:18.561570554</dc:date>
    <meta:editing-duration>PT2H6M38S</meta:editing-duration>
    <meta:editing-cycles>70</meta:editing-cycles>
    <meta:generator>LibreOffice/6.4.7.2$Linux_X86_64 LibreOffice_project/40$Build-2</meta:generator>
    <meta:document-statistic meta:table-count="0" meta:image-count="0" meta:object-count="0" meta:page-count="5" meta:paragraph-count="68" meta:word-count="1898" meta:character-count="11446" meta:non-whitespace-character-count="9426"/>
  </office:meta>
</office:document-meta>
</file>